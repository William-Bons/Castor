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apple-system, BlinkMacSystemFont, 'Segoe UI', Arial, sans-serif, 'Apple Color Emoji', 'Segoe UI Emoji', 'Segoe UI Symbol', 'Noto Color Emoji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olution_med.visit.fk_visit_agr</text:p>
      <text:p text:style-name="Standard">solution_med.visit.fk_visit_booking</text:p>
      <text:p text:style-name="Standard">solution_med.visit.fk_visit_reg_direction</text:p>
      <text:p text:style-name="Standard">solution_med.visit.fk_visit_visit</text:p>
      <text:p text:style-name="Standard">solution_med.add_hosp_info.fk_add_hosp_info_visit</text:p>
      <text:p text:style-name="Standard">solution_med.anketa.fk_anketa_visit</text:p>
      <text:p text:style-name="Standard">solution_med.booking_history.fk_booking_history_visit</text:p>
      <text:p text:style-name="Standard">solution_med.cases.fk_cases_visit1</text:p>
      <text:p text:style-name="Standard">solution_med.certificate.fk_certificate_visit</text:p>
      <text:p text:style-name="Standard">solution_med.certificate_birth.fk_certificate_birth_visit</text:p>
      <text:p text:style-name="Standard">solution_epic.chart.fk_chart_visit</text:p>
      <text:p text:style-name="Standard">solution_epic.chart_consumption.fk_cc_root_visit_id</text:p>
      <text:p text:style-name="Standard">solution_epic.chart_unit_plan.fk_chart_unit_plan_visit</text:p>
      <text:p text:style-name="Standard">solution_med.diet_tables.fk_diet_tables_visit</text:p>
      <text:p text:style-name="Standard">solution_med.direction.fk_direction_visit</text:p>
      <text:p text:style-name="Standard">solution_med.disability.fk_disability_visit</text:p>
      <text:p text:style-name="Standard">solution_med.disp_group_patient_plan.fk_dgpp_disp_group_visit</text:p>
      <text:p text:style-name="Standard">solution_epic.his_pharma.fk_his_pharma_visit</text:p>
      <text:p text:style-name="Standard">solution_med.kvota.fk_kvota_visit100</text:p>
      <text:p text:style-name="Standard">solution_med.kvota.fk_kvota_visit101</text:p>
      <text:p text:style-name="Standard">solution_med.kvt_visit.fk_kvt_visit_visit</text:p>
      <text:p text:style-name="Standard">solution_med.mob_order_visit.fk_mob_order_visit_visit</text:p>
      <text:p text:style-name="Standard">solution_med.mse.fk_mse_visit</text:p>
      <text:p text:style-name="Standard">solution_med.oper_plan.fk_oper_plan_visit</text:p>
      <text:p text:style-name="Standard">solution_med.patdiag.fk_patdiag_visit</text:p>
      <text:p text:style-name="Standard">solution_med.patdirect.fk_patdirect_visit</text:p>
      <text:p text:style-name="Standard">solution_med.patient_unknown.fk_patient_unknown_visit</text:p>
      <text:p text:style-name="Standard">solution_med.patmanip.fk_patmanip_visit</text:p>
      <text:p text:style-name="Standard">solution_med.reanimation.fk_reanimation_root_visit</text:p>
      <text:p text:style-name="Standard">solution_med.reanimation.fk_reanimation_visit101</text:p>
      <text:p text:style-name="Standard">solution_med.recipe.fk_recipe_visit</text:p>
      <text:p text:style-name="Standard">solution_opk.research.fk_research_visit</text:p>
      <text:p text:style-name="Standard">solution_med.special_marks.fk_special_marks_visit</text:p>
      <text:p text:style-name="Standard">solution_med.trip_sheet.fk_trip_sheet_visit</text:p>
      <text:p text:style-name="Standard">solution_med.visit.fk_visit_visit</text:p>
      <text:p text:style-name="Standard">solution_med.visit_booking_info.fk_visit_booking_info_visit</text:p>
      <text:p text:style-name="Standard">solution_med.visit_days.fk_visit_days_visit</text:p>
      <text:p text:style-name="Standard">solution_med.visit_docdep.fk_visit_docdep_visit</text:p>
      <text:p text:style-name="Standard">solution_med.visit_finance.fk_visit_finance_visit</text:p>
      <text:p text:style-name="Standard">solution_med.visit_mes.fk_visit_mes_visit</text:p>
      <text:p text:style-name="Standard">solution_med.visit_move.fk_visit_move_visit</text:p>
      <text:p text:style-name="Standard">solution_med.visit_refuse.fk_visit_refuse_visit</text:p>
      <text:p text:style-name="Standard">solution_med.visit_relatives.fk_visit_relatives_visit</text:p>
      <text:p text:style-name="Standard">inetuser.ws_hmc_appointments.fk_ws_hmc_visi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apple-system, BlinkMacSystemFont, 'Segoe UI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5T12:23:22.560000000</meta:creation-date>
    <meta:print-date>2026-07-15T12:30:52.610000000</meta:print-date>
    <dc:date>2026-07-15T12:31:35.010000000</dc:date>
    <meta:editing-duration>PT8M12S</meta:editing-duration>
    <meta:editing-cycles>1</meta:editing-cycles>
    <meta:document-statistic meta:table-count="0" meta:image-count="0" meta:object-count="0" meta:page-count="1" meta:paragraph-count="44" meta:word-count="44" meta:character-count="1915" meta:non-whitespace-character-count="1915"/>
    <meta:generator>LibreOffice/24.2.7.2$Windows_X86_64 LibreOffice_project/ee3885777aa7032db5a9b65deec9457448a91162</meta:generator>
  </office:meta>
</office:document-meta>
</file>